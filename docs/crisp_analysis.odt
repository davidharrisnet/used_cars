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568cc" officeooo:paragraph-rsid="001568cc" style:font-size-asian="20pt" style:font-size-complex="20pt"/>
    </style:style>
    <style:style style:name="P2" style:family="paragraph" style:parent-style-name="Standard">
      <style:text-properties fo:font-size="16pt" officeooo:rsid="001568cc" officeooo:paragraph-rsid="001568cc" style:font-size-asian="16pt" style:font-size-complex="16pt"/>
    </style:style>
    <style:style style:name="P3" style:family="paragraph" style:parent-style-name="Standard" style:list-style-name="L1">
      <style:text-properties fo:font-size="16pt" officeooo:rsid="001568cc" officeooo:paragraph-rsid="001568cc" style:font-size-asian="16pt" style:font-size-complex="16pt"/>
    </style:style>
    <style:style style:name="P4" style:family="paragraph" style:parent-style-name="Standard">
      <style:text-properties fo:font-size="12pt" officeooo:rsid="001568cc" officeooo:paragraph-rsid="001568cc" style:font-size-asian="12pt" style:font-size-complex="12pt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erarchical process model</text:p>
      <text:p text:style-name="P2">Levels of Abstraction</text:p>
      <text:list text:style-name="L1">
        <text:list-item>
          <text:p text:style-name="P3">Phases</text:p>
          <text:list>
            <text:list-item>
              <text:p text:style-name="P3">generic tasks</text:p>
            </text:list-item>
          </text:list>
        </text:list-item>
      </text:list>
      <text:p text:style-name="P4">This second level is called generic, because it is</text:p>
      <text:p text:style-name="P4">intended to be general enough to cover all possible data mining situations. The generic tasks are</text:p>
      <text:p text:style-name="P4">designed to be as complete and stable as possible. Complete means to cover both the whole</text:p>
      <text:p text:style-name="P4">process of data mining and all possible data mining applications. Stable means that we want the</text:p>
      <text:p text:style-name="P4">model be valid for yet unforeseen developments like new modeling techniques.</text:p>
      <text:p text:style-name="P2"/>
      <text:list text:continue-numbering="true" text:style-name="L1">
        <text:list-item>
          <text:p text:style-name="P3">Generic Tasks</text:p>
        </text:list-item>
        <text:list-item>
          <text:p text:style-name="P3">Specialized Tasks</text:p>
        </text:list-item>
        <text:list-item>
          <text:p text:style-name="P3">Process Instance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20:33:16.986887486</meta:creation-date>
    <meta:generator>LibreOffice/25.8.6.2$Linux_X86_64 LibreOffice_project/580$Build-2</meta:generator>
    <dc:date>2026-05-02T16:43:18.165798478</dc:date>
    <meta:editing-duration>PT19H58M51S</meta:editing-duration>
    <meta:editing-cycles>1</meta:editing-cycles>
    <meta:document-statistic meta:table-count="0" meta:image-count="0" meta:object-count="0" meta:page-count="1" meta:paragraph-count="12" meta:word-count="88" meta:character-count="527" meta:non-whitespace-character-count="456"/>
  </office:meta>
</office:document-meta>
</file>